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fo:min-height="5.75cm" loext:decorative="false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0cm" svg:height="6cm" svg:x="2cm" svg:y="2cm">
          <draw:text-box>
            <text:p>Documento di prova Sophia Vector</text:p>
            <text:p>Obblighi di trasparenza verso il cliente.</text:p>
            <text:p>IBAN IT60X0542811101000000123456.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object-count="1"/>
    <meta:generator>LibreOffice/24.2.7.2$Linux_X86_64 LibreOffice_project/420$Build-2</meta:generator>
  </office:meta>
</office:document-meta>
</file>