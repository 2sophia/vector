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2.75cm" loext:decorative="false"/>
      <style:paragraph-properties style:writing-mode="lr-tb"/>
    </style:style>
    <style:style style:name="gr2" style:family="graphic" style:parent-style-name="standard">
      <style:graphic-properties fo:min-height="5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Default" presentation:presentation-page-layout-name="AL1T0">
        <draw:frame draw:style-name="gr1" draw:layer="layout" svg:width="22cm" svg:height="3cm" svg:x="2cm" svg:y="2cm">
          <draw:text-box>
            <text:p>Documento di prova Sophia Vector</text:p>
          </draw:text-box>
        </draw:frame>
        <draw:frame draw:style-name="gr2" draw:layer="layout" svg:width="22cm" svg:height="6cm" svg:x="2cm" svg:y="6cm">
          <draw:text-box>
            <text:p>Obblighi di trasparenza verso il cliente.</text:p>
            <text:p>IBAN IT60X0542811101000000123456.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5"/>
    <meta:generator>LibreOffice/24.2.7.2$Linux_X86_64 LibreOffice_project/420$Build-2</meta:generator>
  </office:meta>
</office:document-meta>
</file>